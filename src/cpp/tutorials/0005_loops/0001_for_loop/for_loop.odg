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82cm" fo:min-width="2.46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82cm" fo:min-width="3.09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388cm" svg:stroke-color="#00bfff" draw:marker-start-width="0.935cm" draw:marker-end="Rounded_20_short_20_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5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1cm" fo:min-width="10.773cm" fo:padding-top="0.106cm" fo:padding-bottom="0.106cm" fo:padding-left="0.106cm" fo:padding-right="0.10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388cm" svg:stroke-color="#00bfff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7" style:family="graphic" style:parent-style-name="standard">
      <style:graphic-properties svg:stroke-width="0.388cm" svg:stroke-color="#00bfff" draw:marker-start="Arrow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8" style:family="graphic" style:parent-style-name="standard">
      <style:graphic-properties svg:stroke-width="0.388cm" svg:stroke-color="#00bfff" draw:marker-start="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9" style:family="graphic" style:parent-style-name="standard">
      <style:graphic-properties svg:stroke-width="0.388cm" svg:stroke-color="#00bfff" draw:marker-start="" draw:marker-start-width="0.935cm" draw:marker-end="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10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3.831cm" fo:padding-top="0.106cm" fo:padding-bottom="0.106cm" fo:padding-left="0.106cm" fo:padding-right="0.10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5.708cm" fo:padding-top="0.106cm" fo:padding-bottom="0.106cm" fo:padding-left="0.106cm" fo:padding-right="0.10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1cm" fo:min-width="9.121cm" fo:padding-top="0.106cm" fo:padding-bottom="0.106cm" fo:padding-left="0.106cm" fo:padding-right="0.10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4.818cm" fo:padding-top="0.106cm" fo:padding-bottom="0.106cm" fo:padding-left="0.106cm" fo:padding-right="0.10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212cm" svg:stroke-color="#ffffff" draw:marker-start-width="0.67cm" draw:marker-end-width="0.67cm" draw:fill-color="#000000" draw:textarea-horizontal-align="justify" draw:textarea-vertical-align="middle" draw:auto-grow-height="false" fo:min-height="1.583cm" fo:min-width="21.096cm" fo:padding-top="0.106cm" fo:padding-bottom="0.106cm" fo:padding-left="0.106cm" fo:padding-right="0.10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21pt" style:font-weight-asian="bold" style:font-size-complex="21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21pt" style:font-weight-asian="bold" style:font-size-complex="2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4pt" style:font-size-asian="21pt" style:font-size-complex="21pt"/>
    </style:style>
    <style:style style:name="P4" style:family="paragraph">
      <style:paragraph-properties fo:text-align="center" style:writing-mode="lr-tb"/>
      <style:text-properties style:font-name="Exo" fo:font-size="14pt" fo:font-weight="bold" style:font-size-asian="21pt" style:font-weight-asian="bold" style:font-size-complex="21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style:font-name="Exo" fo:font-size="14pt" fo:font-weight="bold" style:font-size-asian="21pt" style:font-weight-asian="bold" style:font-size-complex="21pt" style:font-weight-complex="bold"/>
    </style:style>
    <style:style style:name="P6" style:family="paragraph">
      <style:paragraph-properties fo:margin-left="0.102cm" fo:margin-right="0cm" fo:text-align="center" fo:text-indent="0cm" style:writing-mode="lr-tb"/>
      <style:text-properties style:font-name="arial" fo:font-size="14pt" fo:font-weight="bold" style:font-size-asian="21pt" style:font-weight-asian="bold" style:font-size-complex="21pt" style:font-weight-complex="bold"/>
    </style:style>
    <style:style style:name="P7" style:family="paragraph">
      <loext:graphic-properties draw:fill-color="#000000"/>
      <style:paragraph-properties fo:margin-left="0.102cm" fo:margin-right="0cm" fo:text-align="center" fo:text-indent="0cm" style:writing-mode="lr-tb"/>
      <style:text-properties style:font-name="arial" fo:font-size="14pt" fo:font-weight="bold" style:font-size-asian="21pt" style:font-weight-asian="bold" style:font-size-complex="21pt" style:font-weight-complex="bold"/>
    </style:style>
    <style:style style:name="P8" style:family="paragraph"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P10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size="22pt" fo:font-weight="bold" style:font-size-asian="20pt" style:font-weight-asian="bold" style:font-size-complex="22pt" style:font-weight-complex="bold"/>
    </style:style>
    <style:style style:name="T2" style:family="text">
      <style:text-properties style:font-name="Exo" fo:font-size="40pt" fo:font-weight="bold" style:font-size-asian="32pt" style:font-weight-asian="bold" style:font-size-complex="40pt" style:font-weight-complex="bold"/>
    </style:style>
    <style:style style:name="T3" style:family="text">
      <style:text-properties style:font-name="Exo" fo:font-size="42pt" fo:font-weight="bold" style:font-size-asian="32pt" style:font-weight-asian="bold" style:font-size-complex="42pt" style:font-weight-complex="bold"/>
    </style:style>
    <style:style style:name="T4" style:family="text">
      <style:text-properties style:font-name="Exo" fo:font-size="44pt" fo:font-weight="bold" style:font-size-asian="36pt" style:font-weight-asian="bold" style:font-size-complex="44pt" style:font-weight-complex="bold"/>
    </style:style>
    <style:style style:name="T5" style:family="text">
      <style:text-properties style:font-name="arial" fo:font-size="40pt" fo:font-weight="bold" style:font-size-asian="32pt" style:font-weight-asian="bold" style:font-size-complex="40pt" style:font-weight-complex="bold"/>
    </style:style>
    <style:style style:name="T6" style:family="text">
      <style:text-properties style:font-name="Exo" fo:font-size="32pt" fo:font-weight="bold" style:font-size-asian="26pt" style:font-weight-asian="bold" style:font-size-complex="32pt" style:font-weight-complex="bold"/>
    </style:style>
    <style:style style:name="T7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4" draw:style-name="gr1">
          <draw:custom-shape draw:name="Shape 4" draw:style-name="gr2" draw:text-style-name="P2" draw:layer="layout" svg:width="2.968cm" svg:height="1.132cm" draw:transform="rotate (-1.5707963267949) translate (14.505cm 12.832cm)">
            <text:p text:style-name="P1"><text:span text:style-name="T1">TRUE</text:span></text:p>
            <draw:enhanced-geometry svg:viewBox="0 0 21600 21600" draw:type="rectangle" draw:enhanced-path="M 0 0 L 21600 0 21600 21600 0 21600 0 0 Z N"/>
          </draw:custom-shape>
          <draw:custom-shape draw:name="Shape7_ 2" draw:style-name="gr3" draw:text-style-name="P2" draw:layer="layout" svg:width="3.598cm" svg:height="1.132cm" svg:x="7.884cm" svg:y="8.478cm">
            <text:p text:style-name="P1"><text:span text:style-name="T1">FALSE</text:span></text:p>
            <draw:enhanced-geometry svg:viewBox="0 0 21600 21600" draw:type="rectangle" draw:enhanced-path="M 0 0 L 21600 0 21600 21600 0 21600 0 0 Z N"/>
          </draw:custom-shape>
          <draw:line draw:name="Shape 5" draw:style-name="gr4" draw:text-style-name="P3" draw:layer="layout" svg:x1="12.412cm" svg:y1="5.991cm" svg:x2="12.451cm" svg:y2="9.969cm">
            <text:p/>
          </draw:line>
          <draw:custom-shape draw:name="Shape6_ 5" draw:style-name="gr5" draw:text-style-name="P5" draw:layer="layout" svg:width="11.221cm" svg:height="2.419cm" svg:x="6.786cm" svg:y="5.155cm">
            <text:p text:style-name="P4"><text:span text:style-name="T2">Start 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name="Shape8_ 7" draw:style-name="gr4" draw:text-style-name="P3" draw:layer="layout" svg:x1="12.412cm" svg:y1="12.17cm" svg:x2="12.446cm" svg:y2="16.243cm">
            <text:p/>
          </draw:line>
          <draw:line draw:name="Shape8_ 8" draw:style-name="gr4" draw:text-style-name="P3" draw:layer="layout" svg:x1="12.412cm" svg:y1="17.581cm" svg:x2="12.412cm" svg:y2="21.69cm">
            <text:p/>
          </draw:line>
          <draw:line draw:name="Shape8_ 9" draw:style-name="gr6" draw:text-style-name="P3" draw:layer="layout" svg:x1="18.457cm" svg:y1="23.201cm" svg:x2="18.528cm" svg:y2="11.368cm">
            <text:p/>
          </draw:line>
          <draw:line draw:name="Shape8_ 10" draw:style-name="gr7" draw:text-style-name="P3" draw:layer="layout" svg:x1="14.602cm" svg:y1="11.246cm" svg:x2="18.767cm" svg:y2="11.246cm">
            <text:p/>
          </draw:line>
          <draw:line draw:name="Shape8_ 11" draw:style-name="gr8" draw:text-style-name="P3" draw:layer="layout" svg:x1="11.939cm" svg:y1="22.966cm" svg:x2="18.38cm" svg:y2="22.966cm">
            <text:p/>
          </draw:line>
          <draw:line draw:name="Shape8_ 12" draw:style-name="gr9" draw:text-style-name="P3" draw:layer="layout" svg:x1="9.713cm" svg:y1="11.251cm" svg:x2="6.505cm" svg:y2="11.251cm">
            <text:p/>
          </draw:line>
          <draw:custom-shape draw:name="Shape6_ 6" draw:style-name="gr10" draw:text-style-name="P5" draw:layer="layout" svg:width="4.279cm" svg:height="2.42cm" svg:x="2.349cm" svg:y="10.09cm">
            <text:p text:style-name="P4"><text:span text:style-name="T3">Ex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7" draw:style-name="gr11" draw:text-style-name="P5" draw:layer="layout" svg:width="6.156cm" svg:height="2.42cm" svg:x="9.301cm" svg:y="16.211cm">
            <text:p text:style-name="P4"><text:span text:style-name="T4">bod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8" draw:style-name="gr12" draw:text-style-name="P7" draw:layer="layout" svg:width="9.569cm" svg:height="2.419cm" svg:x="7.595cm" svg:y="21.711cm">
            <text:p text:style-name="P6"><text:span text:style-name="T5">increment+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 6" draw:style-name="gr13" draw:text-style-name="P5" draw:layer="layout" svg:width="5.266cm" svg:height="2.42cm" svg:x="9.745cm" svg:y="10.006cm">
            <text:p text:style-name="P4"><text:span text:style-name="T4">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1" draw:style-name="gr14" draw:text-style-name="P9" draw:layer="layout" svg:width="21.502cm" svg:height="1.989cm" svg:x="0.088cm" svg:y="0.101cm">
            <text:p text:style-name="P8"><text:span text:style-name="T6">for loo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5" draw:text-style-name="P10" draw:layer="layout" svg:width="9.455cm" svg:height="0.962cm" svg:x="11.849cm" svg:y="2.335cm">
            <draw:text-box>
              <text:p><text:span text:style-name="T7">Christopher Andrew Topalia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30T05:32:18.055408600</meta:creation-date>
    <dc:date>2026-07-05T07:31:30.896523400</dc:date>
    <meta:editing-duration>PT9M31S</meta:editing-duration>
    <meta:editing-cycles>3</meta:editing-cycles>
    <meta:generator>LibreOffice/25.2.3.2$Windows_X86_64 LibreOffice_project/bbb074479178df812d175f709636b368952c2ce3</meta:generator>
    <meta:document-statistic meta:object-count="17"/>
  </office:meta>
</office:document-meta>
</file>