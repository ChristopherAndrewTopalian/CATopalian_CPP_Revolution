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Exo" svg:font-family="Ex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921cm" fo:min-width="3.19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21cm" fo:min-width="3.22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388cm" svg:stroke-color="#00bfff" draw:marker-start-width="0.935cm" draw:marker-end="Rounded_20_short_20_Arrow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4" style:family="graphic" style:parent-style-name="standard">
      <style:graphic-properties svg:stroke-width="0.247cm" svg:stroke-color="#00bfff" draw:marker-start-width="0.723cm" draw:marker-end-width="0.723cm" draw:fill-color="#000000" draw:textarea-horizontal-align="justify" draw:textarea-vertical-align="middle" draw:auto-grow-height="false" fo:min-height="2.015cm" fo:min-width="4.962cm" fo:padding-top="0.123cm" fo:padding-bottom="0.123cm" fo:padding-left="0.123cm" fo:padding-right="0.12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388cm" svg:stroke-color="#00bfff" draw:marker-start-width="0.935cm" draw:marker-end="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6" style:family="graphic" style:parent-style-name="standard">
      <style:graphic-properties svg:stroke-width="0.388cm" svg:stroke-color="#00bfff" draw:marker-start="Arrow" draw:marker-start-width="0.935cm" draw:marker-end="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7" style:family="graphic" style:parent-style-name="standard">
      <style:graphic-properties svg:stroke-width="0.388cm" svg:stroke-color="#00bfff" draw:marker-start="" draw:marker-start-width="0.935cm" draw:marker-end="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8" style:family="graphic" style:parent-style-name="standard">
      <style:graphic-properties svg:stroke-width="0.388cm" svg:stroke-color="#00bfff" draw:marker-start="" draw:marker-start-width="0.935cm" draw:marker-end="Arrow" draw:marker-end-width="0.935cm" draw:fill-color="#ffffff" draw:textarea-horizontal-align="center" draw:textarea-vertical-align="middle" fo:padding-top="0.194cm" fo:padding-bottom="0.194cm" fo:padding-left="0.194cm" fo:padding-right="0.194cm" loext:decorative="false"/>
    </style:style>
    <style:style style:name="gr9" style:family="graphic" style:parent-style-name="standard">
      <style:graphic-properties svg:stroke-width="0.247cm" svg:stroke-color="#00bfff" draw:marker-start-width="0.723cm" draw:marker-end-width="0.723cm" draw:fill-color="#000000" draw:textarea-horizontal-align="justify" draw:textarea-vertical-align="middle" draw:auto-grow-height="false" fo:min-height="2.015cm" fo:min-width="3.941cm" fo:padding-top="0.123cm" fo:padding-bottom="0.123cm" fo:padding-left="0.123cm" fo:padding-right="0.12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247cm" svg:stroke-color="#00bfff" draw:marker-start-width="0.723cm" draw:marker-end-width="0.723cm" draw:fill-color="#000000" draw:textarea-horizontal-align="justify" draw:textarea-vertical-align="middle" draw:auto-grow-height="false" fo:min-height="2.015cm" fo:min-width="5.884cm" fo:padding-top="0.123cm" fo:padding-bottom="0.123cm" fo:padding-left="0.123cm" fo:padding-right="0.123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212cm" svg:stroke-color="#ffffff" draw:marker-start-width="0.67cm" draw:marker-end-width="0.67cm" draw:fill-color="#000000" draw:textarea-horizontal-align="justify" draw:textarea-vertical-align="middle" draw:auto-grow-height="false" fo:min-height="1.583cm" fo:min-width="21.096cm" fo:padding-top="0.106cm" fo:padding-bottom="0.106cm" fo:padding-left="0.106cm" fo:padding-right="0.10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3pt" fo:font-weight="bold" style:font-size-asian="20pt" style:font-weight-asian="bold" style:font-size-complex="20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size="13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3pt" style:font-size-asian="20pt" style:font-size-complex="20pt"/>
    </style:style>
    <style:style style:name="P4" style:family="paragraph">
      <style:paragraph-properties fo:text-align="center" style:writing-mode="lr-tb"/>
      <style:text-properties style:font-name="Exo" fo:font-size="15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style:font-name="Exo" fo:font-size="15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 style:writing-mode="lr-tb"/>
      <style:text-properties style:font-name="Exo" fo:font-size="12pt" fo:font-weight="bold" style:font-weight-asian="bold" style:font-weight-complex="bold"/>
    </style:style>
    <style:style style:name="P7" style:family="paragraph">
      <loext:graphic-properties draw:fill-color="#000000"/>
      <style:paragraph-properties fo:text-align="center" style:writing-mode="lr-tb"/>
      <style:text-properties style:font-name="Exo" fo:font-size="12pt" fo:font-weight="bold" style:font-weight-asian="bold" style:font-weight-complex="bold"/>
    </style:style>
    <style:style style:name="P8" style:family="paragraph">
      <loext:graphic-properties draw:fill="none"/>
      <style:text-properties fo:color="#a9a9a9" loext:opacity="100%" fo:font-size="40pt" style:font-size-asian="40pt" style:font-size-complex="40pt"/>
    </style:style>
    <style:style style:name="T1" style:family="text">
      <style:text-properties fo:font-size="21pt" fo:font-weight="bold" style:font-size-asian="18pt" style:font-weight-asian="bold" style:font-size-complex="21pt" style:font-weight-complex="bold"/>
    </style:style>
    <style:style style:name="T2" style:family="text">
      <style:text-properties style:font-name="Exo" fo:font-size="44pt" fo:font-weight="bold" style:font-size-asian="36pt" style:font-weight-asian="bold" style:font-size-complex="44pt" style:font-weight-complex="bold"/>
    </style:style>
    <style:style style:name="T3" style:family="text">
      <style:text-properties style:font-name="Exo" fo:font-size="48pt" fo:font-weight="bold" style:font-size-asian="40pt" style:font-weight-asian="bold" style:font-size-complex="48pt" style:font-weight-complex="bold"/>
    </style:style>
    <style:style style:name="T4" style:family="text">
      <style:text-properties style:font-name="Exo" fo:font-size="32pt" fo:font-weight="bold" style:font-size-asian="26pt" style:font-weight-asian="bold" style:font-size-complex="32pt" style:font-weight-complex="bold"/>
    </style:style>
    <style:style style:name="T5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7" draw:style-name="gr1" draw:text-style-name="P2" draw:layer="layout" svg:width="3.691cm" svg:height="1.171cm" draw:transform="rotate (-1.5707963267949) translate (14.762cm 13.608cm)">
          <text:p text:style-name="P1"><text:span text:style-name="T1">TRUE</text:span></text:p>
          <draw:enhanced-geometry svg:viewBox="0 0 21600 21600" draw:type="rectangle" draw:enhanced-path="M 0 0 L 21600 0 21600 21600 0 21600 0 0 Z N"/>
        </draw:custom-shape>
        <draw:custom-shape draw:name="Shape7_0" draw:style-name="gr2" draw:text-style-name="P2" draw:layer="layout" svg:width="3.72cm" svg:height="1.171cm" svg:x="6.948cm" svg:y="9.111cm">
          <text:p text:style-name="P1"><text:span text:style-name="T1">FALSE</text:span></text:p>
          <draw:enhanced-geometry svg:viewBox="0 0 21600 21600" draw:type="rectangle" draw:enhanced-path="M 0 0 L 21600 0 21600 21600 0 21600 0 0 Z N"/>
        </draw:custom-shape>
        <draw:line draw:name="Shape8" draw:style-name="gr3" draw:text-style-name="P3" draw:layer="layout" svg:x1="12.263cm" svg:y1="6.577cm" svg:x2="12.303cm" svg:y2="10.695cm">
          <text:p/>
        </draw:line>
        <draw:custom-shape draw:name="Shape6_2" draw:style-name="gr4" draw:text-style-name="P5" draw:layer="layout" svg:width="5.452cm" svg:height="2.505cm" svg:x="9.568cm" svg:y="5.296cm">
          <text:p text:style-name="P4"><text:span text:style-name="T2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name="Shape8_0" draw:style-name="gr3" draw:text-style-name="P3" draw:layer="layout" svg:x1="12.263cm" svg:y1="13.224cm" svg:x2="12.303cm" svg:y2="17.529cm">
          <text:p/>
        </draw:line>
        <draw:line draw:name="Shape8_1" draw:style-name="gr5" draw:text-style-name="P3" draw:layer="layout" svg:x1="12.263cm" svg:y1="19.481cm" svg:x2="12.263cm" svg:y2="24.783cm">
          <text:p/>
        </draw:line>
        <draw:line draw:name="Shape8_3" draw:style-name="gr5" draw:text-style-name="P3" draw:layer="layout" svg:x1="19.013cm" svg:y1="24.785cm" svg:x2="19.097cm" svg:y2="12.058cm">
          <text:p/>
        </draw:line>
        <draw:line draw:name="Shape8_2" draw:style-name="gr6" draw:text-style-name="P3" draw:layer="layout" svg:x1="14.984cm" svg:y1="12.02cm" svg:x2="19.296cm" svg:y2="12.02cm">
          <text:p/>
        </draw:line>
        <draw:line draw:name="Shape8_5" draw:style-name="gr7" draw:text-style-name="P3" draw:layer="layout" svg:x1="12.263cm" svg:y1="24.589cm" svg:x2="18.932cm" svg:y2="24.589cm">
          <text:p/>
        </draw:line>
        <draw:line draw:name="Shape8_ 1" draw:style-name="gr8" draw:text-style-name="P3" draw:layer="layout" svg:x1="9.96cm" svg:y1="12.024cm" svg:x2="6.639cm" svg:y2="12.024cm">
          <text:p/>
        </draw:line>
        <draw:custom-shape draw:name="Shape6_0" draw:style-name="gr9" draw:text-style-name="P5" draw:layer="layout" svg:width="4.431cm" svg:height="2.505cm" svg:x="2.335cm" svg:y="10.821cm">
          <text:p text:style-name="P4"><text:span text:style-name="T2">Ex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Shape6_ 1" draw:style-name="gr10" draw:text-style-name="P5" draw:layer="layout" svg:width="6.374cm" svg:height="2.505cm" svg:x="9.108cm" svg:y="17.631cm">
          <text:p text:style-name="P4"><text:span text:style-name="T3">bo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Shape6" draw:style-name="gr4" draw:text-style-name="P5" draw:layer="layout" svg:width="5.452cm" svg:height="2.505cm" svg:x="9.568cm" svg:y="10.734cm">
          <text:p text:style-name="P4"><text:span text:style-name="T3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Shape6_ 2" draw:style-name="gr11" draw:text-style-name="P7" draw:layer="layout" svg:width="21.502cm" svg:height="1.989cm" svg:x="0.088cm" svg:y="0.101cm">
          <text:p text:style-name="P6"><text:span text:style-name="T4">while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8" draw:layer="layout" svg:width="9.455cm" svg:height="0.962cm" svg:x="11.848cm" svg:y="2.335cm">
          <draw:text-box>
            <text:p><text:span text:style-name="T5">Christopher Andrew 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Exo" svg:font-family="Ex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5T07:26:23.208714600</meta:creation-date>
    <dc:date>2026-07-05T07:33:10.853348200</dc:date>
    <meta:editing-duration>PT6M8S</meta:editing-duration>
    <meta:editing-cycles>3</meta:editing-cycles>
    <meta:generator>LibreOffice/25.2.3.2$Windows_X86_64 LibreOffice_project/bbb074479178df812d175f709636b368952c2ce3</meta:generator>
    <meta:document-statistic meta:object-count="15"/>
  </office:meta>
</office:document-meta>
</file>